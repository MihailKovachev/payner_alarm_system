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9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 [m]</text:p>
          </table:table-cell>
          <table:table-cell office:value-type="string" calcext:value-type="string">
            <text:p>Irradiance at angle of half-intensity [mW/m^2]</text:p>
          </table:table-cell>
          <table:table-cell/>
          <table:table-cell office:value-type="string" calcext:value-type="string">
            <text:p>Minimum radiant intensity at 100mA is given as 40mW/s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*COS(17/180*PI())/([.A2])^2" office:value-type="float" office:value="19.1260951192607" calcext:value-type="float">
            <text:p>19.1260951192607</text:p>
          </table:table-cell>
          <table:table-cell/>
          <table:table-cell office:value-type="string" calcext:value-type="string">
            <text:p>At an angle of 17 radiant intensity is 20mW/s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*COS(17/180*PI())/([.A3])^2" office:value-type="float" office:value="4.78152377981518" calcext:value-type="float">
            <text:p>4.781523779815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*COS(17/180*PI())/([.A4])^2" office:value-type="float" office:value="2.12512167991786" calcext:value-type="float">
            <text:p>2.12512167991786</text:p>
          </table:table-cell>
          <table:table-cell/>
          <table:table-cell office:value-type="string" calcext:value-type="string">
            <text:p>Irradiance = 20mW/sr * cos(17) / d^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*COS(17/180*PI())/([.A5])^2" office:value-type="float" office:value="1.19538094495379" calcext:value-type="float">
            <text:p>1.195380944953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*COS(17/180*PI())/([.A6])^2" office:value-type="float" office:value="0.765043804770428" calcext:value-type="float">
            <text:p>0.765043804770428</text:p>
          </table:table-cell>
          <table:table-cell/>
          <table:table-cell office:value-type="string" calcext:value-type="string">
            <text:p>These are absolute minimums in the worst-case, so should work up to about 5-6 meters with a standard receiver of sensitivity greater than 0.4 mW/m^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*COS(17/180*PI())/([.A7])^2" office:value-type="float" office:value="0.531280419979464" calcext:value-type="float">
            <text:p>0.5312804199794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*COS(17/180*PI())/([.A8])^2" office:value-type="float" office:value="0.390328471821647" calcext:value-type="float">
            <text:p>0.3903284718216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*COS(17/180*PI())/([.A9])^2" office:value-type="float" office:value="0.298845236238449" calcext:value-type="float">
            <text:p>0.2988452362384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8:19:18.117511100</meta:creation-date>
    <dc:date>2026-06-07T18:27:17.217887200</dc:date>
    <meta:editing-duration>PT7M58S</meta:editing-duration>
    <meta:editing-cycles>3</meta:editing-cycles>
    <meta:generator>LibreOffice/26.2.3.2$Windows_X86_64 LibreOffice_project/70e089b17412e4cb7773e41413306b17a2328c34</meta:generator>
    <meta:document-statistic meta:table-count="1" meta:cell-count="22" meta:object-count="0"/>
  </office:meta>
</office:document-meta>
</file>