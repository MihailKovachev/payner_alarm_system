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239b64" officeooo:paragraph-rsid="00239b64"/>
    </style:style>
    <style:style style:name="P2" style:family="paragraph" style:parent-style-name="Text_20_body">
      <style:text-properties officeooo:rsid="0025d0d5" officeooo:paragraph-rsid="0025d0d5"/>
    </style:style>
    <style:style style:name="P3" style:family="paragraph" style:parent-style-name="Standard" style:list-style-name="L1">
      <style:text-properties officeooo:rsid="0028caa9" officeooo:paragraph-rsid="0028caa9"/>
    </style:style>
    <style:style style:name="P4" style:family="paragraph" style:parent-style-name="Standard" style:list-style-name="L1">
      <style:text-properties officeooo:rsid="001d4be0" officeooo:paragraph-rsid="001d4be0"/>
    </style:style>
    <style:style style:name="P5" style:family="paragraph" style:parent-style-name="Standard" style:list-style-name="L1">
      <style:text-properties officeooo:rsid="001ff3b3" officeooo:paragraph-rsid="001ff3b3"/>
    </style:style>
    <style:style style:name="P6" style:family="paragraph" style:parent-style-name="Standard" style:list-style-name="L1">
      <style:text-properties officeooo:rsid="0020ed21" officeooo:paragraph-rsid="0020ed21"/>
    </style:style>
    <style:style style:name="P7" style:family="paragraph" style:parent-style-name="Standard" style:list-style-name="L1">
      <style:text-properties officeooo:rsid="0023e8a3" officeooo:paragraph-rsid="0023e8a3"/>
    </style:style>
    <style:style style:name="P8" style:family="paragraph" style:parent-style-name="Standard">
      <style:text-properties officeooo:rsid="0025d0d5" officeooo:paragraph-rsid="0025d0d5"/>
    </style:style>
    <style:style style:name="P9" style:family="paragraph" style:parent-style-name="Standard" style:list-style-name="L2">
      <style:text-properties officeooo:rsid="0023e8a3" officeooo:paragraph-rsid="0023e8a3"/>
    </style:style>
    <style:style style:name="T1" style:family="text">
      <style:text-properties officeooo:rsid="00201b7e"/>
    </style:style>
    <style:style style:name="T2" style:family="text">
      <style:text-properties officeooo:rsid="002c05b1"/>
    </style:style>
    <style:style style:name="T3" style:family="text">
      <style:text-properties officeooo:rsid="002d476b"/>
    </style:style>
    <style:style style:name="T4" style:family="text">
      <style:text-properties officeooo:rsid="002eb382"/>
    </style:style>
    <style:style style:name="T5" style:family="text">
      <style:text-properties officeooo:rsid="00279fb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yner Alarm System</text:p>
      <text:p text:style-name="P2">1. Requirements</text:p>
      <text:list text:style-name="L1">
        <text:list-item>
          <text:list>
            <text:list-item>
              <text:p text:style-name="P3">Powered via USB-C</text:p>
            </text:list-item>
            <text:list-item>
              <text:p text:style-name="P4">Two modules – laser emitting and laser receiving</text:p>
            </text:list-item>
            <text:list-item>
              <text:p text:style-name="P4">Controlled via RFID – a card swipe on a disabled alarm primes the alarm. A card swipe on a triggered alarm disables the alarm and primes it. A card swipe on a primed but untriggered alarm disables the alarm.</text:p>
            </text:list-item>
            <text:list-item>
              <text:p text:style-name="P5">When the alarm is triggered, the song “Sen Trop” by Azis should be played.</text:p>
            </text:list-item>
            <text:list-item>
              <text:p text:style-name="P5">Indicator lights should show the state of the alarm. Green – <text:span text:style-name="T1">disabled</text:span>. Red – <text:span text:style-name="T1">primed. Blinking red – triggered.</text:span></text:p>
            </text:list-item>
            <text:list-item>
              <text:p text:style-name="P6">The alarm should be triggered when the laser is interrupted.</text:p>
            </text:list-item>
            <text:list-item>
              <text:p text:style-name="P7">Should operate in the temperature range of -30 C and +60C. </text:p>
            </text:list-item>
          </text:list>
        </text:list-item>
      </text:list>
      <text:p text:style-name="P8">2. Concept</text:p>
      <text:p text:style-name="P8"><text:tab/>a) emitter – <text:span text:style-name="T2">An infrared LED is driven by a hardware timer at 38 kHz. The </text:span><text:span text:style-name="T3">duty cycle should be between 20% and 30% to allow larger spikes of current and thus brighter pulses, extending the range.</text:span></text:p>
      <text:p text:style-name="P8"><text:tab/>b) receiver – driven by an ESP32-S3-MINI microcontroller. The <text:span text:style-name="T4">infrared signal</text:span> is received by an IR receiver and is processed by the microcontroller. The microcontroller is also connected to an RFID module, an SD card holder and a speaker. <text:span text:style-name="T5">Programmed via USB-C.</text:span></text:p>
      <text:p text:style-name="P8"/>
      <text:list text:style-name="L2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2T19:14:49.155443988</meta:creation-date>
    <dc:date>2026-06-07T07:56:02.294062200</dc:date>
    <meta:editing-duration>PT19M13S</meta:editing-duration>
    <meta:editing-cycles>17</meta:editing-cycles>
    <meta:generator>LibreOffice/26.2.3.2$Windows_X86_64 LibreOffice_project/70e089b17412e4cb7773e41413306b17a2328c34</meta:generator>
    <meta:document-statistic meta:table-count="0" meta:image-count="0" meta:object-count="0" meta:page-count="1" meta:paragraph-count="12" meta:word-count="190" meta:character-count="1083" meta:non-whitespace-character-count="902"/>
  </office:meta>
</office:document-meta>
</file>