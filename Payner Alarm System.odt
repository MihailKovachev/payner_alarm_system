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39b64" officeooo:paragraph-rsid="00239b64"/>
    </style:style>
    <style:style style:name="P2" style:family="paragraph" style:parent-style-name="Text_20_body">
      <style:text-properties officeooo:rsid="0025d0d5" officeooo:paragraph-rsid="0025d0d5"/>
    </style:style>
    <style:style style:name="P3" style:family="paragraph" style:parent-style-name="Standard" style:list-style-name="L1">
      <style:text-properties officeooo:rsid="001d4be0" officeooo:paragraph-rsid="001d4be0"/>
    </style:style>
    <style:style style:name="P4" style:family="paragraph" style:parent-style-name="Standard" style:list-style-name="L1">
      <style:text-properties officeooo:rsid="001ff3b3" officeooo:paragraph-rsid="001ff3b3"/>
    </style:style>
    <style:style style:name="P5" style:family="paragraph" style:parent-style-name="Standard" style:list-style-name="L1">
      <style:text-properties officeooo:rsid="0020ed21" officeooo:paragraph-rsid="0020ed21"/>
    </style:style>
    <style:style style:name="P6" style:family="paragraph" style:parent-style-name="Standard" style:list-style-name="L1">
      <style:text-properties officeooo:rsid="0023e8a3" officeooo:paragraph-rsid="0023e8a3"/>
    </style:style>
    <style:style style:name="P7" style:family="paragraph" style:parent-style-name="Standard">
      <style:text-properties officeooo:rsid="0025d0d5" officeooo:paragraph-rsid="0025d0d5"/>
    </style:style>
    <style:style style:name="P8" style:family="paragraph" style:parent-style-name="Standard" style:list-style-name="L2">
      <style:text-properties officeooo:rsid="0023e8a3" officeooo:paragraph-rsid="0023e8a3"/>
    </style:style>
    <style:style style:name="T1" style:family="text">
      <style:text-properties officeooo:rsid="00201b7e"/>
    </style:style>
    <style:style style:name="T2" style:family="text">
      <style:text-properties officeooo:rsid="00279fb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yner Alarm System</text:p>
      <text:p text:style-name="P2">1. Requirements</text:p>
      <text:list text:style-name="L1">
        <text:list-item>
          <text:list>
            <text:list-item>
              <text:p text:style-name="P3">Battery powered</text:p>
            </text:list-item>
            <text:list-item>
              <text:p text:style-name="P3">Two modules – laser emitting and laser receiving</text:p>
            </text:list-item>
            <text:list-item>
              <text:p text:style-name="P3">Controlled via RFID – a card swipe on a disabled alarm primes the alarm. A card swipe on a triggered alarm disables the alarm and primes it. A card swipe on a primed but untriggered alarm disables the alarm.</text:p>
            </text:list-item>
            <text:list-item>
              <text:p text:style-name="P4">When the alarm is triggered, the song “Sen Trop” by Azis should be played.</text:p>
            </text:list-item>
            <text:list-item>
              <text:p text:style-name="P4">Indicator lights should show the state of the alarm. Green – <text:span text:style-name="T1">disabled</text:span>. Red – <text:span text:style-name="T1">primed. Blinking red – triggered.</text:span></text:p>
            </text:list-item>
            <text:list-item>
              <text:p text:style-name="P5">The alarm should be triggered when the laser is interrupted.</text:p>
            </text:list-item>
            <text:list-item>
              <text:p text:style-name="P6">Should operate in the temperature range of -30 C and +60C. </text:p>
            </text:list-item>
          </text:list>
        </text:list-item>
      </text:list>
      <text:p text:style-name="P7">2. Concept</text:p>
      <text:p text:style-name="P7"/>
      <text:p text:style-name="P7"><text:tab/>a) emitter – powered by a battery. Consists of an IR laser diode driven by a hardware timer tuned to 38 kHZ.</text:p>
      <text:p text:style-name="P7"><text:tab/>b) receiver – driven by an ESP32-S3-MINI microcontroller. The laser is received by an IR receiver and the signal is processed by the microcontroller for the correct frequency. The microcontroller is also connected to an RFID module, an SD card holder and a speaker. <text:span text:style-name="T2">Programmed via USB-C.</text:span></text:p>
      <text:p text:style-name="P7"/>
      <text:list text:style-name="L2">
        <text:list-header>
          <text:p text:style-name="P8"/>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2T19:14:49.155443988</meta:creation-date>
    <dc:date>2026-06-03T20:27:29.973910615</dc:date>
    <meta:editing-duration>PT13M52S</meta:editing-duration>
    <meta:editing-cycles>12</meta:editing-cycles>
    <meta:generator>LibreOffice/26.2.3.2$Linux_X86_64 LibreOffice_project/620$Build-2</meta:generator>
    <meta:document-statistic meta:table-count="0" meta:image-count="0" meta:object-count="0" meta:page-count="1" meta:paragraph-count="12" meta:word-count="179" meta:character-count="1021" meta:non-whitespace-character-count="851"/>
  </office:meta>
</office:document-meta>
</file>